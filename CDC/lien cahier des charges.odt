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ttps://getupnote.com/share/notes/vtaHW1b7bteX75i9CaHxugvpqht1/019cc7e9-594d-74ea-9d79-61e09c5d04a1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ierre-Jordan Tchokoté</meta:initial-creator>
    <dc:creator>Pierre-Jordan Tchokoté</dc:creator>
    <meta:creation-date>2026-04-29T07:28:00Z</meta:creation-date>
    <dc:date>2026-04-29T07:28:00Z</dc:date>
    <meta:template xlink:href="Normal.dotm" xlink:type="simple"/>
    <meta:editing-cycles>1</meta:editing-cycles>
    <meta:editing-duration>PT0S</meta:editing-duration>
    <meta:document-statistic meta:page-count="1" meta:paragraph-count="1" meta:word-count="15" meta:character-count="99" meta:row-count="1" meta:non-whitespace-character-count="85"/>
  </office:meta>
</office:document-meta>
</file>